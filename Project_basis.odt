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 text:style-name="Titulo">JEPA-Spillover</text:h>
      <text:p text:style-name="Normal">Aprendizado preditivo em espaço latente para vigilância genômica de vírus com potencial zoonótico</text:p>
      <text:p text:style-name="Normal">Gabriel Bezerra Motta Câmara · PDJ/Fiocruz · Instituto Aggeu Magalhães</text:p>
      <text:p text:style-name="Normal">Repositórios: github.com/gbmotta/jepa-spillover  |  huggingface.co/gbmotta/jepa-spillover</text:p>
      <text:h text:outline-level="1" text:style-name="H1">1. Visão geral do projeto</text:h>
      <text:p text:style-name="Normal">O JEPA-Spillover é um projeto de pesquisa computacional desenvolvido no âmbito do Pós-Doutorado Júnior (PDJ/Fiocruz) que aplica redes JEPA (Joint Embedding Predictive Architecture) à vigilância genômica de vírus com potencial de transbordamento zoonótico (spillover). O objetivo central é aprender representações latentes de genomas virais, hospedeiros e contextos ecológicos de forma auto-supervisionada, superando a limitação crítica dos modelos supervisionados clássicos: a escassez de rótulos confiáveis de risco zoonótico.</text:p>
      <text:h text:outline-level="1" text:style-name="H1">2. Por que JEPA?</text:h>
      <text:p text:style-name="Normal">Modelos supervisionados tradicionais dependem de rótulos 'zoonótico/não-zoonótico' que são escassos, incompletos e frequentemente enviesados — um vírus rotulado como 'não-zoonótico' pode simplesmente não ter sido suficientemente estudado. Abordagens generativas (autoencoders, MLM nucleotídeo a nucleotídeo) gastam capacidade modelando ruído de baixo nível em vez de semântica funcional.</text:p>
      <text:p text:style-name="Normal">A JEPA aprende prevendo representações latentes de partes do dado a partir de outras partes, sem reconstruir o dado bruto. Isso captura relações funcionais e estruturais relevantes para adaptação viral e risco de spillover, sem depender de rótulos.</text:p>
      <text:h text:outline-level="1" text:style-name="H1">3. Como o projeto funciona — pipeline completo</text:h>
      <text:h text:outline-level="2" text:style-name="H2">3.1  Coleta e curadoria de dados</text:h>
      <text:p text:style-name="Normal">Scripts automatizados baixam sequências genômicas virais de bases públicas:</text:p>
      <text:list>
        <text:list-item>
          <text:p text:style-name="Normal">• NCBI Virus (Entrez/Biopython): genomas de Coronaviridae, Filoviridae, Paramyxoviridae, Orthomyxoviridae, Arenaviridae</text:p>
        </text:list-item>
        <text:list-item>
          <text:p text:style-name="Normal">• VirusHostDB: relações vírus–hospedeiro (TSV direto)</text:p>
        </text:list-item>
        <text:list-item>
          <text:p text:style-name="Normal">• NCBI Taxonomy (taxdump): padronização taxonômica</text:p>
        </text:list-item>
        <text:list-item>
          <text:p text:style-name="Normal">• VirHostNet / P-HIPSTer: interações moleculares vírus–hospedeiro (acesso manual)</text:p>
        </text:list-item>
        <text:list-item>
          <text:p text:style-name="Normal">• GBIF / WAHIS: contexto ecológico e ocorrência de hospedeiros/reservatórios</text:p>
        </text:list-item>
      </text:list>
      <text:p text:style-name="Normal">A curadoria aplica controle de qualidade (comprimento mínimo, fração de bases ambíguas), remoção de duplicatas e padronização taxonômica. O resultado é um dataset tabular em formato Parquet com sequência, metadados de hospedeiro, taxonomia e rótulos heurísticos de risco.</text:p>
      <text:h text:outline-level="2" text:style-name="H2">3.2  Representações numéricas</text:h>
      <text:p text:style-name="Normal">Dois backends configuráveis em config/config.yaml:</text:p>
      <text:list>
        <text:list-item>
          <text:p text:style-name="Normal">• kmer_pca (padrão/baseline): frequências de k-mers (k=6, 4096 atributos) reduzidas por PCA para 256 dimensões. Rápido, sem GPU.</text:p>
        </text:list-item>
        <text:list-item>
          <text:p text:style-name="Normal">• transformer: embeddings gerados por codificadores pré-treinados de DNA (ex.: Nucleotide Transformer) via Hugging Face — captura padrões contextuais longos.</text:p>
        </text:list-item>
      </text:list>
      <text:h text:outline-level="2" text:style-name="H2">3.3  JEPA genômica (pré-treino auto-supervisionado)</text:h>
      <text:p text:style-name="Normal">Arquitetura em PyTorch com três componentes:</text:p>
      <text:list>
        <text:list-item>
          <text:p text:style-name="Normal">• Codificador de contexto fθ (Transformer): codifica um bloco observado do genoma.</text:p>
        </text:list-item>
        <text:list-item>
          <text:p text:style-name="Normal">• Codificador-alvo f̄θ (EMA — sem gradiente direto): gera o embedding de blocos mascarados. Atualizado por média móvel exponencial dos pesos do codificador de contexto.</text:p>
        </text:list-item>
        <text:list-item>
          <text:p text:style-name="Normal">• Preditor gφ: recebe o embedding de contexto + posição-alvo e prevê o embedding-alvo.</text:p>
        </text:list-item>
      </text:list>
      <text:p text:style-name="Normal">A perda é calculada no espaço latente (Smooth L1 entre predição e alvo), não sobre nucleotídeos. Isso evita que o modelo gaste capacidade em ruído de sequência e incentiva aprender relações funcionais entre regiões do genoma.</text:p>
      <text:h text:outline-level="2" text:style-name="H2">3.4  Extensão vírus-hospedeiro e multimodal</text:h>
      <text:p text:style-name="Normal">O embedding viral (JEPA genômica) é usado como contexto para prever o embedding do hospedeiro associado (derivado de taxonomia, filogenia e ecologia). O modelo aprende compatibilidades latentes vírus–hospedeiro, incluindo compatibilidade com Homo sapiens.</text:p>
      <text:p text:style-name="Normal">De forma exploratória, uma versão multimodal integra também embeddings ecológicos (GBIF/WAHIS), criando um espaço latente compartilhado vírus · hospedeiro · ambiente.</text:p>
      <text:h text:outline-level="2" text:style-name="H2">3.5  Fine-tuning supervisionado (risco de spillover)</text:h>
      <text:p text:style-name="Normal">Os embeddings JEPA (pré-treinados sem rótulos) alimentam uma cabeça de classificação leve (regressão logística / MLP). Os rótulos são derivados de: histórico de infecção humana, amplitude de hospedeiros, ocorrência de surtos e evidências de transmissão interespécies.</text:p>
      <text:p text:style-name="Normal">Validação com dois protocolos:</text:p>
      <text:list>
        <text:list-item>
          <text:p text:style-name="Normal">• Validação cruzada estratificada por família viral (5 folds).</text:p>
        </text:list-item>
        <text:list-item>
          <text:p text:style-name="Normal">• Validação entre famílias — holdout completo de famílias inteiras (ex.: Arenaviridae) para simular vírus emergentes nunca vistos no treino.</text:p>
        </text:list-item>
      </text:list>
      <text:h text:outline-level="2" text:style-name="H2">3.6  Avaliação e interpretabilidade</text:h>
      <text:p text:style-name="Normal">Métricas: AUROC, AUPRC, F1, precisão, recall, especificidade e Brier (calibração). Comparação sistemática com baselines: k-mers + LogReg/RF, LSTM supervisionado, Transformer supervisionado.</text:p>
      <text:p text:style-name="Normal">Análise do espaço latente:</text:p>
      <text:list>
        <text:list-item>
          <text:p text:style-name="Normal">• UMAP / t-SNE: projeção 2D colorida por família, hospedeiro e risco.</text:p>
        </text:list-item>
        <text:list-item>
          <text:p text:style-name="Normal">• Clustering (k-means / HDBSCAN): coesão intra-familiar, separação entre zoonóticos e não.</text:p>
        </text:list-item>
        <text:list-item>
          <text:p text:style-name="Normal">• Vizinhança latente (kNN): score de proximidade a zoonóticos conhecidos.</text:p>
        </text:list-item>
        <text:list-item>
          <text:p text:style-name="Normal">• SHAP + ablação: contribuição de regiões genômicas e variáveis ecológicas.</text:p>
        </text:list-item>
      </text:list>
      <text:h text:outline-level="2" text:style-name="H2">3.7  Ranking de priorização</text:h>
      <text:p text:style-name="Normal">Para cada vírus, o score de prioridade combina:</text:p>
      <text:list>
        <text:list-item>
          <text:p text:style-name="Normal">• Score de vizinhança latente: fração ponderada de vizinhos zoonóticos no espaço JEPA (cosseno).</text:p>
        </text:list-item>
        <text:list-item>
          <text:p text:style-name="Normal">• Score supervisionado: probabilidade predita pelo classificador fine-tuned.</text:p>
        </text:list-item>
      </text:list>
      <text:p text:style-name="Normal">O ranking identifica vírus pouco caracterizados que se posicionam próximos a zoonóticos conhecidos — candidatos prioritários para investigação laboratorial e vigilância.</text:p>
      <text:h text:outline-level="1" text:style-name="H1">4. Estrutura do repositório</text:h>
      <text:list>
        <text:list-item>
          <text:p text:style-name="Normal">• config/config.yaml — configuração central única (seeds, hiperparâmetros, caminhos, bases de dados)</text:p>
        </text:list-item>
        <text:list-item>
          <text:p text:style-name="Normal">• scripts/ — download de bases, execução do pipeline, push para GitHub e Hugging Face</text:p>
        </text:list-item>
        <text:list-item>
          <text:p text:style-name="Normal">• src/jepa_spillover/ — pacote Python: data (curadoria, k-mers, sintético), features (embeddings), models (JEPA genômica, vírus-hospedeiro, baselines), training (treino JEPA, fine-tuning), evaluation (métricas, ranking), viz (UMAP/t-SNE)</text:p>
        </text:list-item>
        <text:list-item>
          <text:p text:style-name="Normal">• dashboard/app.py — dashboard Gradio/Streamlit interativo (espaço latente, ranking, métricas)</text:p>
        </text:list-item>
        <text:list-item>
          <text:p text:style-name="Normal">• docs/ — architecture.md, data_sources.md, roadmap.md, fluxogramas Mermaid</text:p>
        </text:list-item>
        <text:list-item>
          <text:p text:style-name="Normal">• presentations/slides.md — apresentação em formato Marp (exportável para PDF/PPTX)</text:p>
        </text:list-item>
        <text:list-item>
          <text:p text:style-name="Normal">• notebooks/01_exploracao.ipynb — notebook de exploração</text:p>
        </text:list-item>
        <text:list-item>
          <text:p text:style-name="Normal">• tests/ — testes automatizados (pytest)</text:p>
        </text:list-item>
        <text:list-item>
          <text:p text:style-name="Normal">• Makefile — atalhos: make download, make pipeline, make dashboard, make push-github, make push-hf</text:p>
        </text:list-item>
      </text:list>
      <text:h text:outline-level="1" text:style-name="H1">5. Execução rápida</text:h>
      <text:p text:style-name="Mono">Instalar ambiente:</text:p>
      <text:p text:style-name="Mono">    conda env create -f environment.yml &amp;&amp; conda activate jepa-spillover</text:p>
      <text:p text:style-name="Mono">Baixar bases públicas (requer e-mail NCBI em config.yaml):</text:p>
      <text:p text:style-name="Mono">    make download</text:p>
      <text:p text:style-name="Mono">Pipeline completo (ou demo sintética sem dados reais):</text:p>
      <text:p text:style-name="Mono">    make pipeline   # dados reais</text:p>
      <text:p text:style-name="Mono">    DEMO=1 bash scripts/run_pipeline.sh   # demo sintética</text:p>
      <text:p text:style-name="Mono">Dashboard interativo:</text:p>
      <text:p text:style-name="Mono">    make dashboard</text:p>
      <text:p text:style-name="Mono">Publicar atualizações:</text:p>
      <text:p text:style-name="Mono">    make push-github &amp;&amp; make push-hf</text:p>
      <text:h text:outline-level="1" text:style-name="H1">6. Repositórios públicos</text:h>
      <text:list>
        <text:list-item>
          <text:p text:style-name="Normal">• Código: https://github.com/gbmotta/jepa-spillover</text:p>
        </text:list-item>
        <text:list-item>
          <text:p text:style-name="Normal">• Modelo (código + checkpoint JEPA): https://huggingface.co/gbmotta/jepa-spillover</text:p>
        </text:list-item>
        <text:list-item>
          <text:p text:style-name="Normal">• Dataset (parquet, embeddings, ranking): https://huggingface.co/datasets/gbmotta/jepa-spillover-data</text:p>
        </text:list-item>
        <text:list-item>
          <text:p text:style-name="Normal">• Dashboard: https://huggingface.co/spaces/gbmotta/jepa-spillover-dashboard</text:p>
        </text:list-item>
      </text:list>
      <text:h text:outline-level="1" text:style-name="H1">7. Cronograma resumido (12 meses)</text:h>
      <text:list>
        <text:list-item>
          <text:p text:style-name="Normal">• Meses 1–3: coleta, curadoria e banco integrado v1</text:p>
        </text:list-item>
        <text:list-item>
          <text:p text:style-name="Normal">• Mês 4: k-mers, embeddings e baselines</text:p>
        </text:list-item>
        <text:list-item>
          <text:p text:style-name="Normal">• Meses 5–6: JEPA genômica (implementação, treino, embeddings preliminares)</text:p>
        </text:list-item>
        <text:list-item>
          <text:p text:style-name="Normal">• Meses 7–8: extensão vírus-hospedeiro e integração ecológica exploratória</text:p>
        </text:list-item>
        <text:list-item>
          <text:p text:style-name="Normal">• Meses 9–10: fine-tuning, validação e comparação com baselines</text:p>
        </text:list-item>
        <text:list-item>
          <text:p text:style-name="Normal">• Mês 11: interpretabilidade, ablação, UMAP/t-SNE, ranking</text:p>
        </text:list-item>
        <text:list-item>
          <text:p text:style-name="Normal">• Mês 12: repositório, manuscrito, relatório final</text:p>
        </text:list-item>
      </text:list>
      <text:h text:outline-level="1" text:style-name="H1">8. Aviso</text:h>
      <text:p text:style-name="Aviso">⚠  Ferramenta de apoio à priorização para vigilância genômica — prova de conceito em estágio inicial. Não substitui investigação laboratorial nem decisões de saúde pública. Resultados in silico exigem validação experimental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Titulo" style:family="paragraph" style:display-name="Titulo">
      <style:text-properties fo:font-size="18pt" fo:font-weight="bold" fo:color="#1565C0"/>
      <style:paragraph-properties fo:margin-bottom="0.3cm" fo:margin-top="0.4cm"/>
    </style:style>
    <style:style style:name="H1" style:family="paragraph" style:display-name="H1">
      <style:text-properties fo:font-size="14pt" fo:font-weight="bold" fo:color="#1565C0"/>
      <style:paragraph-properties fo:margin-bottom="0.2cm" fo:margin-top="0.5cm"/>
    </style:style>
    <style:style style:name="H2" style:family="paragraph" style:display-name="H2">
      <style:text-properties fo:font-size="12pt" fo:font-weight="bold" fo:color="#2E7D32"/>
      <style:paragraph-properties fo:margin-bottom="0.15cm" fo:margin-top="0.35cm"/>
    </style:style>
    <style:style style:name="Normal" style:family="paragraph" style:display-name="Normal">
      <style:text-properties fo:font-size="11pt"/>
      <style:paragraph-properties fo:margin-bottom="0.2cm" fo:margin-top="0cm"/>
    </style:style>
    <style:style style:name="Mono" style:family="paragraph" style:display-name="Mono">
      <style:text-properties fo:font-size="9pt"/>
      <style:paragraph-properties fo:margin-bottom="0.1cm" fo:margin-top="0cm"/>
    </style:style>
    <style:style style:name="Aviso" style:family="paragraph" style:display-name="Aviso">
      <style:text-properties fo:font-size="10pt" fo:font-weight="bold" fo:color="#B71C1C"/>
      <style:paragraph-properties fo:margin-bottom="0.2cm" fo:margin-top="0.1cm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