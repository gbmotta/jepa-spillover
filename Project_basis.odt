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0.965cm"/>
    </style:style>
    <style:style style:name="Table1.B" style:family="table-column">
      <style:table-column-properties style:column-width="10.412cm"/>
    </style:style>
    <style:style style:name="Table1.C" style:family="table-column">
      <style:table-column-properties style:column-width="5.623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ubprojeto de Pós-Doutorado Júnior</text:h>
      <text:h text:style-name="Heading_20_2" text:outline-level="2">Aprendizado preditivo em espaço latente para vigilância genômica de vírus com potencial zoonótico: uma abordagem baseada em redes JEPA</text:h>
      <text:h text:style-name="Heading_20_2" text:outline-level="2">1. Identificação do subprojeto</text:h>
      <text:p text:style-name="Text_20_body"><text:span text:style-name="Strong_20_Emphasis">Candidato:</text:span> Gabriel Bezerra Motta Câmara<text:line-break/><text:span text:style-name="Strong_20_Emphasis">Modalidade:</text:span> Pós-Doutorado Júnior — PDJ/Fiocruz<text:line-break/><text:span text:style-name="Strong_20_Emphasis">Unidade:</text:span> Instituto Aggeu Magalhães — Fiocruz Pernambuco<text:line-break/><text:span text:style-name="Strong_20_Emphasis">Área:</text:span> Bioinformática, Inteligência Artificial, Virologia Computacional e Vigilância Genômica<text:line-break/><text:span text:style-name="Strong_20_Emphasis">Linha de pesquisa:</text:span> Desenvolvimento de abordagens computacionais para predição de risco zoonótico e apoio à vigilância de vírus emergentes.</text:p>
      <text:h text:style-name="Heading_20_2" text:outline-level="2">2. Resumo</text:h>
      <text:p text:style-name="Text_20_body">Eventos de transbordamento zoonótico, ou spillover, representam uma das principais ameaças à saúde pública global. A emergência de vírus como SARS-CoV-2, Ebola, Nipah e Influenza aviária demonstra a necessidade de ferramentas capazes de priorizar vírus com potencial de infectar humanos antes da ocorrência de surtos de grande impacto. Apesar do crescimento acelerado dos bancos de genomas virais provenientes de vigilância genômica, metagenômica ambiental e estudos de viroma, muitos vírus recém-identificados ainda não possuem caracterização funcional, informações epidemiológicas robustas ou rótulos confiáveis de risco zoonótico.</text:p>
      <text:p text:style-name="Text_20_body">Este subprojeto propõe o desenvolvimento de uma abordagem computacional baseada em redes JEPA, do inglês Joint Embedding Predictive Architecture, para aprender representações latentes de genomas virais, hospedeiros e contextos ecológicos associados ao risco de spillover. A proposta busca superar limitações de modelos supervisionados tradicionais, que dependem de rótulos incompletos ou enviesados, utilizando aprendizado auto-supervisionado e preditivo em espaço latente. A arquitetura será treinada para prever embeddings de regiões genômicas, hospedeiros compatíveis e informações ecológicas associadas, permitindo a construção de um espaço representacional capaz de apoiar a identificação de vírus com maior potencial zoonótico.</text:p>
      <text:p text:style-name="Text_20_body">O subprojeto será desenvolvido no período de vigência da bolsa, com foco na construção de uma base integrada de dados, implementação de modelos JEPA, comparação com abordagens supervisionadas, análise de embeddings e geração de rankings preliminares de vírus prioritários para vigilância. A proposta contribuirá para o grupo de pesquisa ao incorporar metodologias modernas de inteligência artificial à análise de vírus emergentes, fortalecendo a capacidade institucional em bioinformática, vigilância genômica e desenvolvimento tecnológico voltado ao Sistema Único de Saúde.</text:p>
      <text:h text:style-name="Heading_20_2" text:outline-level="2"><text:soft-page-break/>3. Justificativa</text:h>
      <text:p text:style-name="Text_20_body">A maioria das doenças infecciosas emergentes de maior impacto em saúde pública possui origem zoonótica. A capacidade de um vírus ultrapassar barreiras de espécie depende de múltiplos fatores, incluindo características genômicas, plasticidade evolutiva, interação com receptores ou proteínas do hospedeiro, amplitude de hospedeiros, contexto ecológico e intensidade de contato entre humanos, animais domésticos e reservatórios silvestres.</text:p>
      <text:p text:style-name="Text_20_body">Atualmente, há um volume crescente de sequências virais depositadas em bancos públicos, oriundas de estudos de vigilância, metagenômica e viroma. Entretanto, grande parte desses vírus permanece sem caracterização funcional. Isso impõe uma limitação importante aos métodos supervisionados convencionais, pois muitos modelos de predição dependem de rótulos como “zoonótico” ou “não zoonótico”. Esses rótulos, além de escassos, podem ser incompletos: um vírus classificado como não zoonótico pode apenas não ter sido suficientemente estudado.</text:p>
      <text:p text:style-name="Text_20_body">Nesse cenário, abordagens auto-supervisionadas baseadas em aprendizado de representações latentes tornam-se especialmente relevantes. As redes JEPA permitem aprender relações estruturais e funcionais entre partes dos dados sem exigir reconstrução literal da sequência ou dependência exclusiva de rótulos finais. No contexto deste subprojeto, o modelo poderá aprender a prever a representação de uma região genômica a partir de outra, a inferir a compatibilidade entre vírus e hospedeiros ou a aproximar vírus semelhantes em um espaço latente compartilhado.</text:p>
      <text:p text:style-name="Text_20_body">A relevância para o SUS e para a sociedade está diretamente relacionada à possibilidade de fortalecer a vigilância genômica e a preparação para emergências sanitárias. Uma ferramenta computacional capaz de priorizar vírus emergentes com maior potencial zoonótico pode auxiliar programas de monitoramento, orientar estudos laboratoriais, apoiar decisões de saúde pública e contribuir para a prevenção de surtos. Além disso, o desenvolvimento de uma solução reprodutível, aberta e adaptável fortalece a soberania tecnológica nacional em inteligência artificial aplicada à saúde.</text:p>
      <text:h text:style-name="Heading_20_2" text:outline-level="2">4. Articulação com o projeto do supervisor e contribuição para o grupo de pesquisa</text:h>
      <text:p text:style-name="Text_20_body">Este subprojeto está associado à linha de pesquisa do supervisor e do grupo/laboratório voltada ao estudo de vírus emergentes, vigilância genômica, bioinformática aplicada e desenvolvimento de metodologias computacionais para saúde pública. A proposta contribui diretamente para esse eixo ao incorporar uma abordagem inovadora de inteligência artificial para análise de genomas virais e predição de potencial zoonótico.</text:p>
      <text:p text:style-name="Text_20_body">A contribuição do subprojeto para o grupo de pesquisa ocorrerá em cinco dimensões principais:</text:p>
      <text:list text:style-name="L1">
        <text:list-item>
          <text:p text:style-name="P1"><text:span text:style-name="Strong_20_Emphasis">Contribuição metodológica:</text:span> implementação de uma arquitetura JEPA aplicada a dados genômicos virais, ampliando o repertório de métodos computacionais disponíveis no grupo.</text:p>
        </text:list-item>
        <text:list-item>
          <text:p text:style-name="P1"><text:span text:style-name="Strong_20_Emphasis">Contribuição em dados:</text:span> organização de uma base integrada contendo sequências virais, metadados de hospedeiros, informações ecológicas e registros de interações vírus-hospedeiro.</text:p>
        </text:list-item>
        <text:list-item>
          <text:p text:style-name="P1"><text:span text:style-name="Strong_20_Emphasis">Contribuição analítica:</text:span> geração de embeddings virais e análises de agrupamento capazes de apoiar hipóteses sobre adaptação, tropismo e risco de spillover.</text:p>
        </text:list-item>
        <text:list-item>
          <text:p text:style-name="P1"><text:soft-page-break/><text:span text:style-name="Strong_20_Emphasis">Contribuição tecnológica:</text:span> desenvolvimento de scripts, modelos treinados, documentação e fluxos computacionais reprodutíveis, que poderão ser reutilizados em estudos futuros do laboratório.</text:p>
        </text:list-item>
        <text:list-item>
          <text:p text:style-name="P1"><text:span text:style-name="Strong_20_Emphasis">Contribuição formativa:</text:span> transferência de conhecimento em inteligência artificial, deep learning, aprendizado auto-supervisionado e bioinformática para estudantes e membros da equipe.</text:p>
        </text:list-item>
      </text:list>
      <text:p text:style-name="Text_20_body">Dessa forma, o subprojeto não será uma iniciativa isolada, mas uma frente computacional integrada às atividades do grupo, com potencial de fortalecer a capacidade institucional em vigilância de vírus emergentes e análise de dados genômicos de interesse para o SUS.</text:p>
      <text:h text:style-name="Heading_20_2" text:outline-level="2">5. Objetivo geral</text:h>
      <text:p text:style-name="Text_20_body">Desenvolver uma abordagem computacional baseada em redes JEPA para aprender representações latentes de genomas virais, hospedeiros e contextos ecológicos, visando apoiar a predição e priorização de vírus com potencial de spillover zoonótico.</text:p>
      <text:h text:style-name="Heading_20_2" text:outline-level="2">6. Objetivos específicos</text:h>
      <text:list text:style-name="L2">
        <text:list-item>
          <text:p text:style-name="P2">Coletar, curar e organizar sequências genômicas de vírus zoonóticos e não zoonóticos a partir de bases públicas.</text:p>
        </text:list-item>
        <text:list-item>
          <text:p text:style-name="P2">Integrar metadados sobre hospedeiros, taxonomia viral, histórico de infecção humana, distribuição geográfica e contexto ecológico.</text:p>
        </text:list-item>
        <text:list-item>
          <text:p text:style-name="P2">Construir representações numéricas de genomas virais utilizando k-mers, embeddings genômicos e codificadores baseados em Transformers.</text:p>
        </text:list-item>
        <text:list-item>
          <text:p text:style-name="P2">Implementar uma arquitetura JEPA genômica para aprendizado auto-supervisionado de representações latentes de sequências virais.</text:p>
        </text:list-item>
        <text:list-item>
          <text:p text:style-name="P2">Desenvolver uma extensão vírus-hospedeiro da arquitetura JEPA para aprender relações entre embeddings virais e embeddings de hospedeiros.</text:p>
        </text:list-item>
        <text:list-item>
          <text:p text:style-name="P2">Avaliar os embeddings aprendidos por meio de UMAP, t-SNE, clustering e análise de vizinhança latente.</text:p>
        </text:list-item>
        <text:list-item>
          <text:p text:style-name="P2">Realizar fine-tuning supervisionado dos embeddings JEPA para predição preliminar de risco de spillover.</text:p>
        </text:list-item>
        <text:list-item>
          <text:p text:style-name="P2">Comparar o desempenho da abordagem JEPA com modelos de referência, como LSTM, Transformers supervisionados e classificadores baseados em k-mers.</text:p>
        </text:list-item>
        <text:list-item>
          <text:p text:style-name="P2">Aplicar análises de interpretabilidade e ablação para identificar regiões genômicas e fatores associados às predições.</text:p>
        </text:list-item>
        <text:list-item>
          <text:p text:style-name="P2">Disponibilizar os códigos, documentação, modelos treinados e resultados preliminares em repositório público, respeitando as normas institucionais de sigilo, propriedade intelectual e ciência aberta.</text:p>
        </text:list-item>
      </text:list>
      <text:h text:style-name="Heading_20_2" text:outline-level="2"><text:soft-page-break/>7. Metodologia e atividades previstas</text:h>
      <text:h text:style-name="Heading_20_3" text:outline-level="3">7.1 Coleta e curadoria dos dados</text:h>
      <text:p text:style-name="Text_20_body">Serão coletadas sequências genômicas virais completas ou quase completas a partir de bases públicas como NCBI Virus, VirusHostDB, ViPR, GISAID e outros repositórios relevantes. Serão priorizados vírus de RNA com histórico conhecido de infecção humana ou animal, incluindo representantes de famílias como Coronaviridae, Filoviridae, Paramyxoviridae, Orthomyxoviridae e Arenaviridae.</text:p>
      <text:p text:style-name="Text_20_body">As sequências serão associadas a metadados taxonômicos, hospedeiro natural, hospedeiro experimental, local de isolamento, data de coleta, histórico de infecção humana e evidências de transmissão interespécies. Quando disponíveis, serão integrados dados de interação vírus-hospedeiro provenientes de bases como VirHostNet e P-HIPSTer, além de informações ecológicas obtidas em bases públicas, como GBIF, WAHIS e registros de vigilância epidemiológica.</text:p>
      <text:p text:style-name="Text_20_body">As atividades incluirão padronização taxonômica, remoção de duplicatas, controle de qualidade, filtragem de sequências incompletas e organização dos dados em estrutura tabular e relacional.</text:p>
      <text:h text:style-name="Heading_20_3" text:outline-level="3">7.2 Construção das representações dos dados</text:h>
      <text:p text:style-name="Text_20_body">As sequências virais serão inicialmente representadas por frequência de k-mers, servindo como baseline interpretável. Em seguida, serão gerados embeddings genômicos utilizando modelos pré-treinados ou codificadores baseados em Transformers para sequências biológicas. Essas representações permitirão capturar padrões locais e globais do genoma viral.</text:p>
      <text:p text:style-name="Text_20_body">Os hospedeiros serão representados por embeddings construídos a partir de informações taxonômicas, filogenéticas e ecológicas. Variáveis ambientais ou epidemiológicas, quando disponíveis, serão codificadas como vetores numéricos ou categorias embutidas em espaços de embeddings.</text:p>
      <text:p text:style-name="Text_20_body">Essa etapa resultará em três conjuntos principais de representações: embeddings virais, embeddings de hospedeiros e embeddings ecológicos/interacionais.</text:p>
      <text:h text:style-name="Heading_20_3" text:outline-level="3">7.3 Implementação da arquitetura JEPA genômica</text:h>
      <text:p text:style-name="Text_20_body">A primeira arquitetura a ser implementada será uma JEPA genômica. O modelo será composto por um codificador de contexto, um codificador de alvo e um preditor latente. A sequência viral será dividida em blocos ou regiões. O codificador de contexto receberá uma parte observada do genoma, enquanto o codificador de alvo produzirá o embedding de outra região da mesma sequência. O preditor será treinado para prever o embedding-alvo a partir do embedding de contexto.</text:p>
      <text:p text:style-name="Text_20_body">O objetivo não será reconstruir nucleotídeos diretamente, mas aprender relações latentes entre regiões do genoma viral. Essa estratégia poderá capturar dependências funcionais e estruturais relevantes para a adaptação viral.</text:p>
      <text:h text:style-name="Heading_20_3" text:outline-level="3">7.4 Extensão JEPA vírus-hospedeiro e multimodal</text:h>
      <text:p text:style-name="Text_20_body">Após a implementação da JEPA genômica, será desenvolvida uma extensão voltada à relação vírus-hospedeiro. Nessa abordagem, o modelo receberá o embedding viral como contexto e será treinado <text:soft-page-break/>para prever o embedding do hospedeiro associado. Essa estratégia permitirá aprender compatibilidades latentes entre vírus e hospedeiros.</text:p>
      <text:p text:style-name="Text_20_body">De forma exploratória, será avaliada uma versão multimodal incorporando informações ecológicas e de interação molecular. O modelo poderá ser treinado para prever embeddings de contexto ecológico a partir de embeddings virais, ou para integrar genoma, hospedeiro e ambiente em um espaço latente compartilhado.</text:p>
      <text:h text:style-name="Heading_20_3" text:outline-level="3">7.5 Fine-tuning supervisionado e comparação com modelos de referência</text:h>
      <text:p text:style-name="Text_20_body">Após o pré-treinamento JEPA, os embeddings aprendidos serão utilizados em uma etapa de fine-tuning supervisionado para estimar risco de spillover. Os rótulos serão derivados do histórico conhecido de infecção humana, amplitude de hospedeiros, ocorrência de surtos e evidências de transmissão interespécies.</text:p>
      <text:p text:style-name="Text_20_body">A abordagem JEPA será comparada com modelos de referência, incluindo classificadores baseados em k-mers, LSTM, Transformers supervisionados e classificadores tradicionais aplicados a embeddings fixos. O desempenho será avaliado por AUC-ROC, AUC-PR, F1-score, precisão, recall, especificidade e calibração probabilística.</text:p>
      <text:h text:style-name="Heading_20_3" text:outline-level="3">7.6 Validação, análise de embeddings e interpretabilidade</text:h>
      <text:p text:style-name="Text_20_body">A validação incluirá particionamento estratificado dos dados e testes de generalização entre famílias virais. Sempre que possível, será adotado desenho experimental no qual determinadas famílias virais são excluídas do treinamento e utilizadas apenas no teste, simulando a aplicação em vírus emergentes ou pouco caracterizados.</text:p>
      <text:p text:style-name="Text_20_body">Os embeddings serão avaliados por UMAP, t-SNE, clustering e análise de vizinhança latente. Vírus pouco caracterizados que se posicionem próximos a vírus zoonóticos conhecidos poderão ser priorizados para investigação futura.</text:p>
      <text:p text:style-name="Text_20_body">Serão aplicadas análises de ablação, removendo regiões genômicas, metadados de hospedeiro ou variáveis ecológicas para avaliar seu impacto sobre as predições. Técnicas como SHAP poderão ser aplicadas aos classificadores finais treinados sobre os embeddings, permitindo estimar a contribuição relativa de atributos genômicos e ecológicos.</text:p>
      <text:h text:style-name="Heading_20_2" text:outline-level="2">8. Metas e entregáveis</text:h>
      <text:h text:style-name="Heading_20_3" text:outline-level="3">Meta 1 — Base de dados integrada de vírus, hospedeiros e metadados</text:h>
      <text:p text:style-name="Text_20_body"><text:span text:style-name="Strong_20_Emphasis">Atividades:</text:span> coleta, curadoria, padronização e organização dos dados.<text:line-break/><text:span text:style-name="Strong_20_Emphasis">Entregáveis:</text:span> banco de dados tabular/relacional; documentação da curadoria; relatório técnico preliminar.</text:p>
      <text:h text:style-name="Heading_20_3" text:outline-level="3">Meta 2 — Representações genômicas e baselines computacionais</text:h>
      <text:p text:style-name="Text_20_body"><text:span text:style-name="Strong_20_Emphasis">Atividades:</text:span> geração de k-mers, embeddings genômicos e modelos comparativos iniciais.<text:line-break/><text:span text:style-name="Strong_20_Emphasis">Entregáveis:</text:span> scripts de pré-processamento; matriz de atributos; resultados de baseline.</text:p>
      <text:h text:style-name="Heading_20_3" text:outline-level="3"><text:soft-page-break/>Meta 3 — Implementação da arquitetura JEPA genômica</text:h>
      <text:p text:style-name="Text_20_body"><text:span text:style-name="Strong_20_Emphasis">Atividades:</text:span> desenvolvimento do codificador de contexto, codificador de alvo e preditor latente.<text:line-break/><text:span text:style-name="Strong_20_Emphasis">Entregáveis:</text:span> modelo JEPA genômico funcional; checkpoints treinados; avaliação preliminar dos embeddings.</text:p>
      <text:h text:style-name="Heading_20_3" text:outline-level="3">Meta 4 — Extensão vírus-hospedeiro e análise multimodal exploratória</text:h>
      <text:p text:style-name="Text_20_body"><text:span text:style-name="Strong_20_Emphasis">Atividades:</text:span> incorporação de embeddings de hospedeiros e dados ecológicos/interacionais.<text:line-break/><text:span text:style-name="Strong_20_Emphasis">Entregáveis:</text:span> modelo JEPA vírus-hospedeiro; espaço latente compartilhado; visualizações por UMAP/t-SNE.</text:p>
      <text:h text:style-name="Heading_20_3" text:outline-level="3">Meta 5 — Fine-tuning e validação para predição de spillover</text:h>
      <text:p text:style-name="Text_20_body"><text:span text:style-name="Strong_20_Emphasis">Atividades:</text:span> treinamento supervisionado, comparação com baselines e validação entre famílias virais.<text:line-break/><text:span text:style-name="Strong_20_Emphasis">Entregáveis:</text:span> métricas de desempenho; ranking preliminar de vírus prioritários; relatório técnico-científico.</text:p>
      <text:h text:style-name="Heading_20_3" text:outline-level="3">Meta 6 — Disseminação, documentação e produção científica</text:h>
      <text:p text:style-name="Text_20_body"><text:span text:style-name="Strong_20_Emphasis">Atividades:</text:span> organização do repositório, escrita de manuscrito, preparação de material técnico e apresentação dos resultados.<text:line-break/><text:span text:style-name="Strong_20_Emphasis">Entregáveis:</text:span> repositório documentado; manuscrito científico; apresentação em seminário ou evento; relatório final da bolsa.</text:p>
      <text:h text:style-name="Heading_20_2" text:outline-level="2">9. Infraestrutura disponível</text:h>
      <text:p text:style-name="Text_20_body">O subprojeto será desenvolvido com apoio da infraestrutura computacional e científica disponível no Instituto Aggeu Magalhães/Fiocruz Pernambuco e no grupo de pesquisa associado ao supervisor. A execução contará com estações de trabalho, acesso a ambiente computacional para processamento de dados genômicos, armazenamento de bases públicas, bibliotecas de bioinformática e frameworks de aprendizado profundo.</text:p>
      <text:p text:style-name="Text_20_body">Quando disponível, serão utilizados recursos de GPU para treinamento dos modelos, especialmente nas etapas envolvendo codificadores baseados em Transformers e redes JEPA. O projeto utilizará ferramentas abertas e reprodutíveis, incluindo Python, PyTorch, scikit-learn, pandas, Biopython, UMAP, FAISS ou bibliotecas equivalentes para busca vetorial e análise de embeddings.</text:p>
      <text:p text:style-name="Text_20_body">A infraestrutura existente é adequada à execução do subprojeto dentro do período de vigência da bolsa, uma vez que a proposta se baseia predominantemente em dados públicos, desenvolvimento computacional e validação in silico, sem necessidade direta de experimentação animal, coleta de amostras humanas ou processamento laboratorial durante esta etapa.</text:p>
      <text:h text:style-name="Heading_20_2" text:outline-level="2">10. Exequibilidade no período da bolsa</text:h>
      <text:p text:style-name="Text_20_body">O subprojeto foi planejado para ser executado em 12 meses, com foco em uma prova de conceito robusta e cientificamente publicável. Para garantir a exequibilidade, a proposta será organizada em níveis progressivos de complexidade.</text:p>
      <text:p text:style-name="Text_20_body"><text:soft-page-break/>A primeira etapa priorizará famílias virais com maior disponibilidade de dados e relevância zoonótica documentada. A arquitetura JEPA genômica será desenvolvida como núcleo metodológico principal. A extensão vírus-hospedeiro e a integração ecológica serão realizadas de forma incremental, priorizando variáveis com melhor completude e qualidade.</text:p>
      <text:p text:style-name="Text_20_body">Essa estratégia permite que o subprojeto produza resultados relevantes mesmo que a integração multimodal completa dependa de etapas futuras. Ao final da vigência, espera-se entregar uma base curada, modelos JEPA treinados, comparação com baselines, análise de embeddings, ranking preliminar de vírus prioritários e manuscrito científico em preparação ou submissão.</text:p>
      <text:h text:style-name="Heading_20_2" text:outline-level="2">11. Cronograma de atividad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Mês</text:p>
            </table:table-cell>
            <table:table-cell table:style-name="Table1.A1" office:value-type="string">
              <text:p text:style-name="Table_20_Heading">Atividades principais</text:p>
            </table:table-cell>
            <table:table-cell table:style-name="Table1.A1" office:value-type="string">
              <text:p text:style-name="Table_20_Heading">Produtos esperados</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Levantamento de bases, definição dos critérios de inclusão e desenho final do pipeline</text:p>
          </table:table-cell>
          <table:table-cell table:style-name="Table1.A1" office:value-type="string">
            <text:p text:style-name="Table_20_Contents">Plano técnico e lista de bases</text:p>
          </table:table-cell>
        </table:table-row>
        <table:table-row>
          <table:table-cell table:style-name="Table1.A1" office:value-type="string">
            <text:p text:style-name="Table_20_Contents">2</text:p>
          </table:table-cell>
          <table:table-cell table:style-name="Table1.A1" office:value-type="string">
            <text:p text:style-name="Table_20_Contents">Coleta e curadoria inicial de genomas virais e metadados</text:p>
          </table:table-cell>
          <table:table-cell table:style-name="Table1.A1" office:value-type="string">
            <text:p text:style-name="Table_20_Contents">Base preliminar curada</text:p>
          </table:table-cell>
        </table:table-row>
        <table:table-row>
          <table:table-cell table:style-name="Table1.A1" office:value-type="string">
            <text:p text:style-name="Table_20_Contents">3</text:p>
          </table:table-cell>
          <table:table-cell table:style-name="Table1.A1" office:value-type="string">
            <text:p text:style-name="Table_20_Contents">Padronização taxonômica, remoção de redundâncias e estruturação dos dados</text:p>
          </table:table-cell>
          <table:table-cell table:style-name="Table1.A1" office:value-type="string">
            <text:p text:style-name="Table_20_Contents">Banco integrado versão 1</text:p>
          </table:table-cell>
        </table:table-row>
        <table:table-row>
          <table:table-cell table:style-name="Table1.A1" office:value-type="string">
            <text:p text:style-name="Table_20_Contents">4</text:p>
          </table:table-cell>
          <table:table-cell table:style-name="Table1.A1" office:value-type="string">
            <text:p text:style-name="Table_20_Contents">Geração de k-mers, embeddings genômicos e baselines iniciais</text:p>
          </table:table-cell>
          <table:table-cell table:style-name="Table1.A1" office:value-type="string">
            <text:p text:style-name="Table_20_Contents">Matrizes de atributos e modelos baseline</text:p>
          </table:table-cell>
        </table:table-row>
        <table:table-row>
          <table:table-cell table:style-name="Table1.A1" office:value-type="string">
            <text:p text:style-name="Table_20_Contents">5</text:p>
          </table:table-cell>
          <table:table-cell table:style-name="Table1.A1" office:value-type="string">
            <text:p text:style-name="Table_20_Contents">Implementação da arquitetura JEPA genômica</text:p>
          </table:table-cell>
          <table:table-cell table:style-name="Table1.A1" office:value-type="string">
            <text:p text:style-name="Table_20_Contents">Protótipo funcional</text:p>
          </table:table-cell>
        </table:table-row>
        <table:table-row>
          <table:table-cell table:style-name="Table1.A1" office:value-type="string">
            <text:p text:style-name="Table_20_Contents">6</text:p>
          </table:table-cell>
          <table:table-cell table:style-name="Table1.A1" office:value-type="string">
            <text:p text:style-name="Table_20_Contents">Treinamento e ajuste da JEPA genômica</text:p>
          </table:table-cell>
          <table:table-cell table:style-name="Table1.A1" office:value-type="string">
            <text:p text:style-name="Table_20_Contents">Embeddings virais preliminares</text:p>
          </table:table-cell>
        </table:table-row>
        <table:table-row>
          <table:table-cell table:style-name="Table1.A1" office:value-type="string">
            <text:p text:style-name="Table_20_Contents">7</text:p>
          </table:table-cell>
          <table:table-cell table:style-name="Table1.A1" office:value-type="string">
            <text:p text:style-name="Table_20_Contents">Implementação da extensão vírus-hospedeiro</text:p>
          </table:table-cell>
          <table:table-cell table:style-name="Table1.A1" office:value-type="string">
            <text:p text:style-name="Table_20_Contents">Modelo JEPA vírus-hospedeiro</text:p>
          </table:table-cell>
        </table:table-row>
        <table:table-row>
          <table:table-cell table:style-name="Table1.A1" office:value-type="string">
            <text:p text:style-name="Table_20_Contents">8</text:p>
          </table:table-cell>
          <table:table-cell table:style-name="Table1.A1" office:value-type="string">
            <text:p text:style-name="Table_20_Contents">Integração exploratória de dados ecológicos/interacionais</text:p>
          </table:table-cell>
          <table:table-cell table:style-name="Table1.A1" office:value-type="string">
            <text:p text:style-name="Table_20_Contents">Espaço latente multimodal preliminar</text:p>
          </table:table-cell>
        </table:table-row>
        <table:table-row>
          <table:table-cell table:style-name="Table1.A1" office:value-type="string">
            <text:p text:style-name="Table_20_Contents">9</text:p>
          </table:table-cell>
          <table:table-cell table:style-name="Table1.A1" office:value-type="string">
            <text:p text:style-name="Table_20_Contents">Fine-tuning supervisionado para risco de spillover</text:p>
          </table:table-cell>
          <table:table-cell table:style-name="Table1.A1" office:value-type="string">
            <text:p text:style-name="Table_20_Contents">Modelo preditivo e métricas iniciais</text:p>
          </table:table-cell>
        </table:table-row>
        <table:table-row>
          <table:table-cell table:style-name="Table1.A1" office:value-type="string">
            <text:p text:style-name="Table_20_Contents">10</text:p>
          </table:table-cell>
          <table:table-cell table:style-name="Table1.A1" office:value-type="string">
            <text:p text:style-name="Table_20_Contents">Validação, comparação com LSTM/Transformer/k-mers e análise entre famílias virais</text:p>
          </table:table-cell>
          <table:table-cell table:style-name="Table1.A1" office:value-type="string">
            <text:p text:style-name="Table_20_Contents">Relatório comparativo</text:p>
          </table:table-cell>
        </table:table-row>
        <table:table-row>
          <table:table-cell table:style-name="Table1.A1" office:value-type="string">
            <text:p text:style-name="Table_20_Contents">11</text:p>
          </table:table-cell>
          <table:table-cell table:style-name="Table1.A1" office:value-type="string">
            <text:p text:style-name="Table_20_Contents">Análise de interpretabilidade, ablação, UMAP/t-SNE e ranking de vírus prioritários</text:p>
          </table:table-cell>
          <table:table-cell table:style-name="Table1.A1" office:value-type="string">
            <text:p text:style-name="Table_20_Contents">Figuras, rankings e interpretação</text:p>
          </table:table-cell>
        </table:table-row>
        <table:table-row>
          <table:table-cell table:style-name="Table1.A1" office:value-type="string">
            <text:p text:style-name="Table_20_Contents">12</text:p>
          </table:table-cell>
          <table:table-cell table:style-name="Table1.A1" office:value-type="string">
            <text:p text:style-name="Table_20_Contents">Organização do repositório, escrita de manuscrito e relatório final</text:p>
          </table:table-cell>
          <table:table-cell table:style-name="Table1.A1" office:value-type="string">
            <text:p text:style-name="Table_20_Contents">Manuscrito, repositório e relatório final</text:p>
          </table:table-cell>
        </table:table-row>
      </table:table>
      <text:h text:style-name="Heading_20_2" text:outline-level="2">12. Resultados esperados</text:h>
      <text:p text:style-name="Text_20_body">Espera-se que o subprojeto produza os seguintes resultados:</text:p>
      <text:list text:style-name="L3">
        <text:list-item>
          <text:p text:style-name="P3">Uma base integrada e documentada de genomas virais, hospedeiros e metadados relevantes para estudo de spillover.</text:p>
        </text:list-item>
        <text:list-item>
          <text:p text:style-name="P3">Uma arquitetura JEPA adaptada à análise de sequências virais.</text:p>
        </text:list-item>
        <text:list-item>
          <text:p text:style-name="P3">Embeddings virais capazes de capturar padrões latentes associados a hospedeiro, adaptação e risco zoonótico.</text:p>
        </text:list-item>
        <text:list-item>
          <text:p text:style-name="P3">Um modelo preliminar de predição de potencial de spillover baseado em fine-tuning dos embeddings JEPA.</text:p>
        </text:list-item>
        <text:list-item>
          <text:p text:style-name="P3"><text:soft-page-break/>Comparação sistemática entre JEPA, LSTM, Transformers supervisionados e modelos baseados em k-mers.</text:p>
        </text:list-item>
        <text:list-item>
          <text:p text:style-name="P3">Visualizações dos espaços latentes por UMAP, t-SNE e clustering.</text:p>
        </text:list-item>
        <text:list-item>
          <text:p text:style-name="P3">Ranking preliminar de vírus pouco caracterizados com maior similaridade latente a vírus zoonóticos conhecidos.</text:p>
        </text:list-item>
        <text:list-item>
          <text:p text:style-name="P3">Scripts, documentação e modelos disponibilizados em repositório público, respeitando normas institucionais.</text:p>
        </text:list-item>
        <text:list-item>
          <text:p text:style-name="P3">Produção de pelo menos um manuscrito científico durante ou imediatamente após a vigência da bolsa.</text:p>
        </text:list-item>
        <text:list-item>
          <text:p text:style-name="P3">Fortalecimento da capacidade do grupo em inteligência artificial aplicada à vigilância genômica.</text:p>
        </text:list-item>
      </text:list>
      <text:h text:style-name="Heading_20_2" text:outline-level="2">13. Relevância para o SUS e para a sociedade</text:h>
      <text:p text:style-name="Text_20_body">O subprojeto tem relevância direta para o SUS ao propor uma metodologia computacional para apoiar a vigilância de vírus emergentes. A identificação precoce de vírus com maior potencial zoonótico pode auxiliar na priorização de amostras, orientar estudos laboratoriais, apoiar estratégias de monitoramento e contribuir para a preparação frente a emergências sanitárias.</text:p>
      <text:p text:style-name="Text_20_body">A proposta também se alinha ao papel da Fiocruz na produção de conhecimento científico e tecnológico voltado à saúde pública. Ao desenvolver modelos abertos, reprodutíveis e adaptáveis ao contexto brasileiro, o subprojeto contribui para a autonomia nacional em bioinformática, inteligência artificial e vigilância genômica.</text:p>
      <text:p text:style-name="Text_20_body">Além disso, a metodologia poderá ser aplicada futuramente a dados de viroma ambiental, vigilância em fauna silvestre, monitoramento de reservatórios e estudos de metagenômica, fortalecendo estratégias preventivas em territórios vulnerabilizados e em contextos de maior risco de emergência de doenças infecciosas.</text:p>
      <text:h text:style-name="Heading_20_2" text:outline-level="2">14. Adequação da formação do candidato ao subprojeto</text:h>
      <text:p text:style-name="Text_20_body">A formação do candidato é diretamente compatível com a execução do subprojeto. O candidato possui doutorado em Bioinformática, com experiência em inteligência artificial, aprendizado de máquina, análise de dados biológicos, desenvolvimento de pipelines computacionais e aplicação de modelos de deep learning a problemas biomédicos.</text:p>
      <text:p text:style-name="Text_20_body">Essa formação permite contribuir tanto na dimensão metodológica, por meio da implementação de arquiteturas JEPA, Transformers, modelos supervisionados e análise de embeddings, quanto na dimensão aplicada, pela integração com dados genômicos, metadados biológicos e questões de vigilância em saúde pública.</text:p>
      <text:p text:style-name="Text_20_body">A atuação do candidato no subprojeto também contribuirá para o projeto do supervisor ao incorporar competências específicas em inteligência artificial moderna, aprendizado auto-supervisionado e desenvolvimento de soluções computacionais reprodutíveis para análise de vírus emergentes.</text:p>
      <text:h text:style-name="Heading_20_2" text:outline-level="2"><text:soft-page-break/>15. Potenciais produtos técnico-científicos</text:h>
      <text:p text:style-name="Text_20_body">Durante a vigência da bolsa, o subprojeto poderá gerar os seguintes produtos:</text:p>
      <text:list text:style-name="L4">
        <text:list-item>
          <text:p text:style-name="P4">Manuscrito científico sobre uso de redes JEPA para representação latente de genomas virais.</text:p>
        </text:list-item>
        <text:list-item>
          <text:p text:style-name="P4">Manuscrito ou comunicação científica sobre predição de potencial zoonótico a partir de embeddings virais e vírus-hospedeiro.</text:p>
        </text:list-item>
        <text:list-item>
          <text:p text:style-name="P4">Repositório público com scripts de curadoria, treinamento e análise de embeddings.</text:p>
        </text:list-item>
        <text:list-item>
          <text:p text:style-name="P4">Relatório técnico sobre aplicação de aprendizado auto-supervisionado à vigilância genômica.</text:p>
        </text:list-item>
        <text:list-item>
          <text:p text:style-name="P4">Material didático ou tutorial em português sobre JEPA aplicada à bioinformática viral.</text:p>
        </text:list-item>
        <text:list-item>
          <text:p text:style-name="P4">Apresentação em seminário interno, congresso ou workshop de bioinformática, virologia ou saúde pública.</text:p>
        </text:list-item>
      </text:list>
      <text:h text:style-name="Heading_20_2" text:outline-level="2">16. Considerações finais</text:h>
      <text:p text:style-name="Text_20_body">Este subprojeto propõe uma abordagem inovadora para a vigilância genômica de vírus emergentes, utilizando redes JEPA para aprender representações latentes de genomas virais, hospedeiros e contextos ecológicos. A proposta está alinhada aos objetivos do PDJ/Fiocruz ao combinar formação de pesquisador, produção de conhecimento científico, desenvolvimento tecnológico e contribuição para o SUS.</text:p>
      <text:p text:style-name="Text_20_body">Ao deslocar o foco de modelos supervisionados tradicionais para aprendizado preditivo em espaço latente, o subprojeto busca lidar com um problema central da vigilância viral: a escassez de rótulos confiáveis para vírus recém-descobertos. Com isso, pretende-se gerar uma ferramenta computacional capaz de apoiar a priorização de vírus com potencial zoonótico, fortalecer a capacidade analítica do grupo de pesquisa e contribuir para estratégias preventivas em saúde públic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9T17:18:00.271565386</meta:creation-date>
    <dc:date>2026-06-09T17:18:38.453356612</dc:date>
    <meta:editing-duration>PT42S</meta:editing-duration>
    <meta:editing-cycles>1</meta:editing-cycles>
    <meta:document-statistic meta:table-count="1" meta:image-count="0" meta:object-count="0" meta:page-count="9" meta:paragraph-count="149" meta:word-count="2976" meta:character-count="22517" meta:non-whitespace-character-count="19713"/>
    <meta:generator>LibreOffice/24.2.7.2$Linux_X86_64 LibreOffice_project/420$Build-2</meta:generator>
  </office:meta>
</office:document-meta>
</file>