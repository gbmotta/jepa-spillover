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 text:style-name="Titulo">JEPA-Spillover</text:h>
      <text:p text:style-name="Sub">Aprendizado preditivo em espaço latente para vigilância genômica de vírus com potencial zoonótico</text:p>
      <text:p text:style-name="Sub">Gabriel Bezerra Motta Câmara · PDJ/Fiocruz · Instituto Aggeu Magalhães</text:p>
      <text:p text:style-name="Sub">github.com/gbmotta/jepa-spillover  |  huggingface.co/gbmotta/jepa-spillover</text:p>
      <text:h text:outline-level="1" text:style-name="H1">1. Visão geral do projeto</text:h>
      <text:p text:style-name="Normal">O JEPA-Spillover é um projeto de pesquisa computacional desenvolvido no âmbito do Pós-Doutorado Júnior (PDJ/Fiocruz) no Instituto Aggeu Magalhães. O projeto aplica redes JEPA (Joint Embedding Predictive Architecture) à vigilância genômica de vírus com potencial de transbordamento zoonótico (spillover), aprendendo representações latentes de genomas virais, hospedeiros e contextos ecológicos de forma auto-supervisionada.</text:p>
      <text:p text:style-name="Normal">A proposta se articula diretamente com iniciativas nacionais de vigilância já estabelecidas — como o InfoDengue, o InfoGripe e os sistemas do Ministério da Saúde — ao oferecer uma camada computacional capaz de antecipar riscos virais ainda antes que surtos sejam detectados por métodos epidemiológicos tradicionais.</text:p>
      <text:h text:outline-level="1" text:style-name="H1">2. Limitações das metodologias tradicionais e por que JEPA</text:h>
      <text:p text:style-name="Destaque">Os métodos clássicos de vigilância e predição de risco zoonótico enfrentam limitações estruturais que a abordagem JEPA busca superar:</text:p>
      <text:h text:outline-level="2" text:style-name="H2">2.1  Dependência de rótulos escassos e enviesados</text:h>
      <text:p text:style-name="Normal">Modelos supervisionados dependem de rótulos 'zoonótico/não-zoonótico'. Esses rótulos são escassos, incompletos e frequentemente enviesados: um vírus classificado como 'não-zoonótico' pode simplesmente não ter sido suficientemente estudado. A JEPA opera sem essa dependência, aprendendo padrões funcionais a partir da estrutura dos próprios genomas.</text:p>
      <text:h text:outline-level="2" text:style-name="H2">2.2  Incapacidade de predição a longo prazo com métodos tradicionais</text:h>
      <text:p text:style-name="Normal">Sistemas de vigilância como o InfoDengue e o InfoGripe são altamente eficazes para monitoramento em tempo real e predição de curto prazo, mas não foram projetados para identificar vírus desconhecidos com potencial zoonótico antes de um surto. Modelos estatísticos tradicionais (séries temporais, regressões epidemiológicas) dependem de dados históricos de transmissão — inexistentes para vírus emergentes recém-descobertos.</text:p>
      <text:p text:style-name="Normal">A predição de longo prazo e a priorização proativa de vírus ainda sem histórico epidemiológico requerem justamente o tipo de representação latente que as redes JEPA aprendem: padrões estruturais e funcionais do genoma que predizem compatibilidade com hospedeiros humanos antes mesmo de qualquer caso clínico registrado.</text:p>
      <text:h text:outline-level="2" text:style-name="H2">2.3  Abordagens generativas e seus gargalos</text:h>
      <text:p text:style-name="Normal">Métodos de aprendizado profundo baseados em reconstrução (autoencoders, modelos de linguagem nucleotídeo a nucleotídeo) gastam capacidade modelando ruído de sequência de baixo nível em vez de semântica funcional. A JEPA prevê representações latentes — não nucleotídeos — capturando relações biológicas relevantes com maior eficiência.</text:p>
      <text:h text:outline-level="1" text:style-name="H1">3. Como o projeto funciona — pipeline completo</text:h>
      <text:h text:outline-level="2" text:style-name="H2">3.1  Coleta e curadoria de dados</text:h>
      <text:p text:style-name="Normal">Scripts automatizados baixam sequências genômicas virais de bases públicas:</text:p>
      <text:p text:style-name="Normal">• NCBI Virus (Entrez/Biopython): Coronaviridae, Filoviridae, Paramyxoviridae, Orthomyxoviridae, Arenaviridae</text:p>
      <text:p text:style-name="Normal">• VirusHostDB: relações vírus–hospedeiro (TSV direto)</text:p>
      <text:p text:style-name="Normal">• NCBI Taxonomy (taxdump): padronização taxonômica</text:p>
      <text:p text:style-name="Normal">• VirHostNet / P-HIPSTer: interações moleculares vírus–hospedeiro</text:p>
      <text:p text:style-name="Normal">• GBIF / WAHIS: contexto ecológico e ocorrência de hospedeiros/reservatórios</text:p>
      <text:p text:style-name="Normal">A curadoria aplica QC (comprimento mínimo, fração de bases ambíguas), remoção de duplicatas e padronização taxonômica. Resultado: dataset Parquet com sequência, metadados de hospedeiro, taxonomia e rótulos heurísticos de risco.</text:p>
      <text:h text:outline-level="2" text:style-name="H2">3.2  Representações numéricas</text:h>
      <text:p text:style-name="Normal">• kmer_pca (baseline): frequências de k-mers (k=6) reduzidas por PCA para 256 dimensões. Rápido, sem GPU.</text:p>
      <text:p text:style-name="Normal">• transformer: embeddings por codificadores pré-treinados de DNA (ex.: Nucleotide Transformer via Hugging Face).</text:p>
      <text:h text:outline-level="2" text:style-name="H2">3.3  JEPA genômica (pré-treino auto-supervisionado)</text:h>
      <text:p text:style-name="Normal">• Codificador de contexto fθ (Transformer): codifica um bloco observado do genoma.</text:p>
      <text:p text:style-name="Normal">• Codificador-alvo f̄θ (EMA, stop-grad): gera o embedding de blocos mascarados.</text:p>
      <text:p text:style-name="Normal">• Preditor gφ: prevê o embedding-alvo a partir do contexto + posição.</text:p>
      <text:p text:style-name="Normal">A perda é calculada no espaço latente (Smooth L1), não sobre nucleotídeos — incentivando aprendizado de relações funcionais entre regiões do genoma.</text:p>
      <text:h text:outline-level="2" text:style-name="H2">3.4  Extensão vírus-hospedeiro e multimodal</text:h>
      <text:p text:style-name="Normal">O embedding viral prevê o embedding do hospedeiro associado, aprendendo compatibilidades latentes vírus–hospedeiro (incluindo Homo sapiens). Versão exploratória integra embeddings ecológicos, criando espaço latente compartilhado vírus · hospedeiro · ambiente.</text:p>
      <text:h text:outline-level="2" text:style-name="H2">3.5  Fine-tuning supervisionado (risco de spillover)</text:h>
      <text:p text:style-name="Normal">Embeddings JEPA alimentam classificador leve treinado com rótulos derivados de: histórico de infecção humana, amplitude de hospedeiros, surtos e transmissão interespécies. Validação: CV estratificado por família (5 folds) + holdout de famílias inteiras para simular vírus emergentes.</text:p>
      <text:h text:outline-level="2" text:style-name="H2">3.6  Avaliação e interpretabilidade</text:h>
      <text:p text:style-name="Normal">• Métricas: AUROC, AUPRC, F1, precisão, recall, especificidade, Brier.</text:p>
      <text:p text:style-name="Normal">• Baselines: k-mers + LogReg/RF, LSTM supervisionado, Transformer supervisionado.</text:p>
      <text:p text:style-name="Normal">• UMAP / t-SNE: projeção 2D por família, hospedeiro e risco.</text:p>
      <text:p text:style-name="Normal">• SHAP + ablação: contribuição de regiões genômicas e variáveis ecológicas.</text:p>
      <text:h text:outline-level="2" text:style-name="H2">3.7  Ranking de priorização</text:h>
      <text:p text:style-name="Normal">Score de prioridade combina vizinhança latente (proximidade cosseno a zoonóticos conhecidos) e probabilidade supervisionada. Vírus anônimos próximos a Ebola ou SARS sobem no ranking automaticamente — candidatos prioritários para vigilância laboratorial.</text:p>
      <text:h text:outline-level="1" text:style-name="H1">4. Articulação com iniciativas nacionais de vigilância</text:h>
      <text:p text:style-name="Destaque">Um dos argumentos centrais do projeto é sua complementaridade — não concorrência — com os sistemas de vigilância já estabelecidos no Brasil:</text:p>
      <text:h text:outline-level="2" text:style-name="H2">4.1  InfoDengue e InfoGripe</text:h>
      <text:p text:style-name="Normal">O InfoDengue e o InfoGripe são plataformas consolidadas de monitoramento epidemiológico em tempo real, amplamente utilizadas pelo Ministério da Saúde e por secretarias estaduais. Contudo, seu foco é o monitoramento de vírus já conhecidos e circulantes. O JEPA-Spillover atua na etapa anterior: identificar, entre vírus pouco caracterizados provenientes de vigilância ambiental e metagenômica, aqueles com maior potencial de se tornarem futuros alvos dos sistemas de monitoramento.</text:p>
      <text:p text:style-name="Normal">A integração natural entre as abordagens é uma colaboração futura explícita: vírus priorizados pelo ranking JEPA poderiam ser incorporados como alertas precoces para o InfoDengue/InfoGripe, potencializando sua capacidade de resposta antes da emergência de surtos.</text:p>
      <text:h text:outline-level="2" text:style-name="H2">4.2  Alinhamento com a Agenda Nacional de Vigilância Genômica</text:h>
      <text:p text:style-name="Normal">O projeto se alinha às diretrizes do Ministério da Saúde e da Fiocruz para fortalecimento da vigilância genômica no Brasil, especialmente no contexto pós-pandemia de COVID-19, que evidenciou a necessidade de infraestrutura computacional para análise rápida de genomas virais. A abordagem JEPA contribui para essa agenda ao oferecer uma ferramenta reprodutível, aberta e adaptável ao contexto brasileiro, com potencial de integração a redes de vigilância existentes como o SIVEP-Gripe, o CIEVS e o Sistema de Alerta e Resposta de Emergências.</text:p>
      <text:h text:outline-level="2" text:style-name="H2">4.3  Complementaridade metodológica, não substituição</text:h>
      <text:p text:style-name="Normal">É fundamental deixar claro que o JEPA-Spillover não pretende substituir as metodologias epidemiológicas tradicionais. Modelos estatísticos de transmissão, análises de séries temporais e sistemas de alerta precoce como o InfoDengue continuarão sendo essenciais para o monitoramento em tempo real. A proposta é ofertar uma camada adicional de inteligência genômica que amplie a janela de antecipação, especialmente para vírus emergentes sem histórico epidemiológico documentado.</text:p>
      <text:h text:outline-level="1" text:style-name="H1">5. Inteligência artificial como diferencial institucional</text:h>
      <text:p text:style-name="Destaque">O desenvolvimento de competências em IA aplicada à saúde representa um diferencial estratégico para o Instituto Aggeu Magalhães e para a Fiocruz como um todo:</text:p>
      <text:h text:outline-level="2" text:style-name="H2">5.1  Capacitação e formação em IA para a equipe</text:h>
      <text:p text:style-name="Normal">O subprojeto prevê — além da entrega de modelos e código — a transferência de conhecimento em inteligência artificial, deep learning e aprendizado auto-supervisionado para estudantes e membros da equipe do laboratório. Esse componente formativo é um produto duradouro: mesmo que o modelo JEPA seja refinado em etapas futuras, as competências desenvolvidas permanecem na instituição e podem ser aplicadas a outros contextos.</text:p>
      <text:p text:style-name="Normal">Como diferencial concreto, o projeto pode incluir:</text:p>
      <text:p text:style-name="Normal">• Tutoriais e material didático em português sobre JEPA aplicada à bioinformática viral.</text:p>
      <text:p text:style-name="Normal">• Workshops internos sobre aprendizado auto-supervisionado, embeddings e análise de genomas com IA.</text:p>
      <text:p text:style-name="Normal">• Oferta de capacitação para colaboradores de outros grupos do IAM/Fiocruz interessados em IA aplicada à saúde.</text:p>
      <text:p text:style-name="Normal">• Documentação e scripts reutilizáveis que funcionem como base para projetos futuros do laboratório.</text:p>
      <text:h text:outline-level="2" text:style-name="H2">5.2  Soberania tecnológica em IA para saúde pública</text:h>
      <text:p text:style-name="Normal">Desenvolver soluções de IA abertas, reprodutíveis e adaptadas ao contexto brasileiro é uma forma concreta de fortalecer a autonomia nacional em tecnologias críticas para saúde pública. Dependência de ferramentas proprietárias ou de modelos treinados exclusivamente em dados internacionais representa uma vulnerabilidade estratégica — especialmente em cenários de emergência sanitária, quando a velocidade e a adequação local das ferramentas são determinantes.</text:p>
      <text:h text:outline-level="2" text:style-name="H2">5.3  Posicionamento do IAM/Fiocruz na fronteira da bioinformática</text:h>
      <text:p text:style-name="Normal">A aplicação de arquiteturas de aprendizado profundo de última geração (JEPA, Transformers) a problemas de vigilância genômica posiciona o Instituto Aggeu Magalhães na fronteira da bioinformática computacional aplicada à saúde pública. Esse posicionamento fortalece a competitividade em editais nacionais e internacionais, abre portas para colaborações científicas e reforça a missão institucional da Fiocruz de produzir ciência e tecnologia voltadas ao Sistema Único de Saúde.</text:p>
      <text:h text:outline-level="1" text:style-name="H1">6. Estrutura do repositório</text:h>
      <text:p text:style-name="Normal">• config/config.yaml — configuração central (seeds, hiperparâmetros, caminhos, bases de dados)</text:p>
      <text:p text:style-name="Normal">• scripts/ — download de bases, pipeline, push para GitHub e Hugging Face</text:p>
      <text:p text:style-name="Normal">• src/jepa_spillover/ — pacote Python completo (curadoria, embeddings, JEPA, baselines, avaliação, viz)</text:p>
      <text:p text:style-name="Normal">• dashboard/app.py — dashboard Gradio interativo (espaço latente, ranking, métricas)</text:p>
      <text:p text:style-name="Normal">• docs/ — architecture.md, data_sources.md, roadmap.md, fluxogramas Mermaid</text:p>
      <text:p text:style-name="Normal">• presentations/slides.md — apresentação Marp (PDF/PPTX)</text:p>
      <text:p text:style-name="Normal">• notebooks/01_exploracao.ipynb — exploração interativa</text:p>
      <text:p text:style-name="Normal">• tests/ — testes automatizados (pytest)</text:p>
      <text:p text:style-name="Normal">• Makefile — make download / make pipeline / make dashboard / make push-github / make push-hf</text:p>
      <text:h text:outline-level="1" text:style-name="H1">7. Execução rápida</text:h>
      <text:p text:style-name="Mono">conda env create -f environment.yml &amp;&amp; conda activate jepa-spillover</text:p>
      <text:p text:style-name="Mono">make download          # baixa bases públicas (requer e-mail NCBI em config.yaml)</text:p>
      <text:p text:style-name="Mono">make pipeline          # pipeline completo com dados reais</text:p>
      <text:p text:style-name="Mono">DEMO=1 bash scripts/run_pipeline.sh   # demo com dados sintéticos</text:p>
      <text:p text:style-name="Mono">make dashboard         # sobe dashboard interativo</text:p>
      <text:p text:style-name="Mono">make push-github &amp;&amp; make push-hf      # publica atualizações</text:p>
      <text:h text:outline-level="1" text:style-name="H1">8. Repositórios públicos</text:h>
      <text:p text:style-name="Normal">• Código:   https://github.com/gbmotta/jepa-spillover</text:p>
      <text:p text:style-name="Normal">• Modelo:   https://huggingface.co/gbmotta/jepa-spillover</text:p>
      <text:p text:style-name="Normal">• Dataset:  https://huggingface.co/datasets/gbmotta/jepa-spillover-data</text:p>
      <text:p text:style-name="Normal">• Dashboard: https://huggingface.co/spaces/gbmotta/jepa-spillover-dashboard</text:p>
      <text:h text:outline-level="1" text:style-name="H1">9. Cronograma resumido (12 meses)</text:h>
      <text:p text:style-name="Normal">• Meses 1–3: coleta, curadoria e banco integrado v1</text:p>
      <text:p text:style-name="Normal">• Mês 4: k-mers, embeddings e baselines + articulação com InfoDengue/InfoGripe</text:p>
      <text:p text:style-name="Normal">• Meses 5–6: JEPA genômica (implementação, treino, embeddings preliminares)</text:p>
      <text:p text:style-name="Normal">• Meses 7–8: extensão vírus-hospedeiro e integração ecológica exploratória</text:p>
      <text:p text:style-name="Normal">• Meses 9–10: fine-tuning, validação e comparação com baselines</text:p>
      <text:p text:style-name="Normal">• Mês 11: interpretabilidade, ablação, UMAP/t-SNE, ranking</text:p>
      <text:p text:style-name="Normal">• Mês 12: repositório, manuscrito, material didático/capacitação, relatório final</text:p>
      <text:h text:outline-level="1" text:style-name="H1">10. Aviso</text:h>
      <text:p text:style-name="Aviso">⚠  Ferramenta de apoio à priorização para vigilância genômica — prova de conceito em estágio inicial. Não substitui investigação laboratorial, sistemas de vigilância epidemiológica estabelecidos (InfoDengue, InfoGripe) nem decisões de saúde pública. Resultados in silico exigem validação experimental.</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ulo" style:family="paragraph" style:display-name="Titulo">
      <style:text-properties fo:font-weight="bold" fo:font-size="18pt" fo:color="#1565C0"/>
      <style:paragraph-properties fo:margin-top="0.4cm" fo:margin-bottom="0.3cm"/>
    </style:style>
    <style:style style:name="Sub" style:family="paragraph" style:display-name="Sub">
      <style:text-properties fo:font-style="italic" fo:font-size="12pt" fo:color="#555555"/>
      <style:paragraph-properties fo:margin-top="0cm" fo:margin-bottom="0.1cm"/>
    </style:style>
    <style:style style:name="H1" style:family="paragraph" style:display-name="H1">
      <style:text-properties fo:font-weight="bold" fo:font-size="14pt" fo:color="#1565C0"/>
      <style:paragraph-properties fo:margin-top="0.5cm" fo:margin-bottom="0.2cm"/>
    </style:style>
    <style:style style:name="H2" style:family="paragraph" style:display-name="H2">
      <style:text-properties fo:font-weight="bold" fo:font-size="12pt" fo:color="#2E7D32"/>
      <style:paragraph-properties fo:margin-top="0.35cm" fo:margin-bottom="0.15cm"/>
    </style:style>
    <style:style style:name="Normal" style:family="paragraph" style:display-name="Normal">
      <style:text-properties fo:font-size="11pt"/>
      <style:paragraph-properties fo:margin-top="0cm" fo:margin-bottom="0.25cm"/>
    </style:style>
    <style:style style:name="Mono" style:family="paragraph" style:display-name="Mono">
      <style:text-properties fo:font-size="9pt" fo:color="#333333"/>
      <style:paragraph-properties fo:margin-top="0cm" fo:margin-bottom="0.1cm"/>
    </style:style>
    <style:style style:name="Aviso" style:family="paragraph" style:display-name="Aviso">
      <style:text-properties fo:font-weight="bold" fo:font-size="10pt" fo:color="#B71C1C"/>
      <style:paragraph-properties fo:margin-top="0cm" fo:margin-bottom="0.2cm"/>
    </style:style>
    <style:style style:name="Destaque" style:family="paragraph" style:display-name="Destaque">
      <style:text-properties fo:font-weight="bold" fo:font-size="11pt" fo:color="#01579B"/>
      <style:paragraph-properties fo:margin-top="0cm" fo:margin-bottom="0.2cm"/>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